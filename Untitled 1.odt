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8000001BDDDB87A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278in" fo:margin-bottom="0.08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.0417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5" style:family="paragraph" style:parent-style-name="Heading_20_1">
      <style:paragraph-properties fo:margin-left="0in" fo:margin-right="0in" fo:margin-top="0.278in" fo:margin-bottom="0.0835in" style:contextual-spacing="false" fo:line-height="138%" fo:text-indent="0in" style:auto-text-indent="false" style:writing-mode="lr-tb"/>
      <style:text-properties officeooo:paragraph-rsid="001d911c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cccccc" loext:opacity="100%" style:text-line-through-style="none" style:text-line-through-type="none" style:font-name="Droid Sans Mono" fo:font-size="10.5pt" fo:font-style="normal" style:text-underline-style="none" fo:font-weight="normal" style:text-blinking="false" fo:background-color="#1f1f1f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officeooo:paragraph-rsid="001d911c"/>
    </style:style>
    <style:style style:name="P12" style:family="paragraph" style:parent-style-name="Text_20_body">
      <style:text-properties officeooo:rsid="001d911c" officeooo:paragraph-rsid="001d911c"/>
    </style:style>
    <style:style style:name="P13" style:family="paragraph" style:parent-style-name="Text_20_body">
      <style:text-properties officeooo:paragraph-rsid="001ee02d"/>
    </style:style>
    <style:style style:name="P14" style:family="paragraph" style:parent-style-name="Text_20_body">
      <style:paragraph-properties fo:margin-left="0in" fo:margin-right="0in" fo:margin-top="0.278in" fo:margin-bottom="0.0835in" style:contextual-spacing="false" fo:line-height="138%" fo:text-indent="0in" style:auto-text-indent="false" style:writing-mode="lr-tb"/>
      <style:text-properties officeooo:paragraph-rsid="001d911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d911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7e6f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347b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347b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e02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7e6f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024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ee02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rsid="001f7e6f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color="#c586c0" loext:opacity="100%"/>
    </style:style>
    <style:style style:name="T18" style:family="text">
      <style:text-properties fo:color="#569cd6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9cdcfe" loext:opacity="100%"/>
    </style:style>
    <style:style style:name="T22" style:family="text">
      <style:text-properties fo:color="#d4d4d4" loext:opacity="100%"/>
    </style:style>
    <style:style style:name="T23" style:family="text">
      <style:text-properties fo:color="#b5cea8" loext:opacity="100%"/>
    </style:style>
    <style:style style:name="T24" style:family="text">
      <style:text-properties fo:color="#d7ba7d" loext:opacity="100%"/>
    </style:style>
    <style:style style:name="T25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51721e2-7fff-71db-b2d0-bddbe171cb00"/>Memorando</text:p>
      <text:p text:style-name="Text_20_body"/>
      <text:p text:style-name="P4"><text:span text:style-name="T1">De:</text:span><text:span text:style-name="T16"> </text:span><text:span text:style-name="T6">Lúcio Nguendelamba Marcial Vitorino</text:span></text:p>
      <text:p text:style-name="P4"><text:span text:style-name="T1">Nº de Matrícula: </text:span><text:span text:style-name="T8">939032485</text:span></text:p>
      <text:p text:style-name="P4"><text:span text:style-name="T1">Disciplina: </text:span><text:span text:style-name="T8">CPD</text:span></text:p>
      <text:p text:style-name="P4"><text:span text:style-name="T1">Assunto:</text:span><text:span text:style-name="T16"> <text:s/>Introduzir a programação com MPI (Message Passing Interface)</text:span></text:p>
      <text:p text:style-name="P4"><text:span text:style-name="T1">Data: </text:span><text:span text:style-name="T10">12 / 05 / 2026</text:span></text:p>
      <text:p text:style-name="Text_20_body"/>
      <text:h text:style-name="P1" text:outline-level="1">1. Introdução </text:h>
      <text:p text:style-name="Text_20_body"/>
      <text:p text:style-name="P3">Este projeto insere-se no âmbito da introdução à programação paralela utilizando a tecnologia MPI, com o objetivo de compreender como múltiplos processos podem executar simultaneamente e comunicar entre si através da troca de mensagens. Ao longo do trabalho, são explorados conceitos fundamentais como comunicação ponto-a-ponto, sincronização entre processos e medição de desempenho em ambientes distribuídos.</text:p>
      <text:p text:style-name="Text_20_body">O desenvolvimento do projeto baseia-se na análise e modificação de programas que implementam diferentes formas de comunicação entre processos, permitindo observar o comportamento de uma rede de processos organizados em anel. A partir dessas implementações, são realizadas medições experimentais de desempenho, com foco na latência de comunicação e na largura de banda da rede.</text:p>
      <text:p text:style-name="Text_20_body">Além disso, o projeto propõe a comparação entre diferentes estratégias de comunicação, nomeadamente o envio individual de mensagens e o uso de comunicação coletiva (broadcast), permitindo avaliar o impacto de cada abordagem no desempenho global do sistema. Desta forma, pretende-se consolidar conhecimentos teóricos e práticos sobre computação paralela e eficiência de comunicação em sistemas distribuíd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2. Experiências Realizadas</text:h>
      <text:p text:style-name="P11"><text:span text:style-name="T2">a. Examinar o código para determinar sua funcionalidade.</text:span><text:span text:style-name="T5"><text:line-break/></text:span>O código do ficheiro <text:span text:style-name="Source_20_Text">sendReceive</text:span> implementa uma comunicação em anel utilizando MPI, onde cada processo envia uma mensagem ao processo seguinte, enquanto o último processo devolve a mensagem ao primeiro, formando um ciclo contínuo. O número de vezes que a mensagem percorre esse anel é definido pela variável <text:span text:style-name="Source_20_Text">rounds</text:span>. O principal objetivo do programa é medir o custo/tempo das operações de envio e receção de mensagens entre processos.<text:span text:style-name="T11"><text:line-break/></text:span></text:p>
      <text:p text:style-name="P11"><text:span text:style-name="T11">b.</text:span><text:span text:style-name="T3"> Compilação e execução<text:line-break/></text:span><draw:frame draw:style-name="fr1" draw:name="Image1" text:anchor-type="char" svg:x="-0.1146in" svg:y="0.3429in" svg:width="6.6929in" svg:height="3.1283in" draw:z-index="0"><draw:image xlink:href="Pictures/10000001000003B8000001BDDDB87A7F.png" xlink:type="simple" xlink:show="embed" xlink:actuate="onLoad" draw:mime-type="image/png"/></draw:frame></text:p>
      <text:p text:style-name="P12"><text:span text:style-name="T2">c) interpretação dos resultados !</text:span></text:p>
      <text:p text:style-name="P13"><text:span text:style-name="Strong_20_Emphasis"><text:span text:style-name="T13">Rounds</text:span></text:span><text:span text:style-name="T9">: determina o número de vezes que a mensagem percorreu o anel de comunicação entre os processos. </text:span></text:p>
      <text:p text:style-name="P13"><text:span text:style-name="Strong_20_Emphasis">N Processes</text:span>: representa o número total de processos envolvidos na execução e comunicação MPI. <text:span text:style-name="Strong_20_Emphasis">Time</text:span>: indica o tempo total necessário para que todas as operações de envio (<text:span text:style-name="Source_20_Text">Send</text:span>) e receção (<text:span text:style-name="Source_20_Text">Recv</text:span>) fossem concluídas ao longo das <text:span text:style-name="Emphasis">N</text:span> rondas pelos <text:span text:style-name="Emphasis">N</text:span> processos. </text:p>
      <text:p text:style-name="P13"><text:span text:style-name="Strong_20_Emphasis">Average time per Send/Recv</text:span>: representa o tempo médio gasto em cada operação de envio e receção de mensagens realizada pelos processos durante as <text:span text:style-name="Emphasis">N</text:span> rondas de comunicação.<text:span text:style-name="T9"><text:line-break/><text:line-break/>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h text:style-name="P5" text:outline-level="1"><text:span text:style-name="T14">3. Desafios</text:span></text:h>
      <text:p text:style-name="P14"><text:span text:style-name="T15">latência + bandwidth</text:span></text:p>
      <text:p text:style-name="P9"><text:span text:style-name="T17">#include</text:span><text:span text:style-name="T18"> </text:span><text:span text:style-name="T19">&lt;stdio.h&gt;</text:span></text:p>
      <text:p text:style-name="P6"><text:span text:style-name="T17">#include</text:span><text:span text:style-name="T18"> </text:span><text:span text:style-name="T19">&lt;stdlib.h&gt;</text:span></text:p>
      <text:p text:style-name="P6"><text:span text:style-name="T17">#include</text:span><text:span text:style-name="T18"> </text:span><text:span text:style-name="T19">&lt;mpi.h&gt;</text:span></text:p>
      <text:p text:style-name="P8"/>
      <text:p text:style-name="P6"><text:span text:style-name="T18">int</text:span> <text:span text:style-name="T20">main</text:span>(<text:span text:style-name="T18">int</text:span> <text:span text:style-name="T21">argc</text:span>, <text:span text:style-name="T18">char</text:span> <text:span text:style-name="T22">*</text:span><text:span text:style-name="T21">argv</text:span><text:span text:style-name="T18">[]</text:span>)</text:p>
      <text:p text:style-name="P6">{</text:p>
      <text:p text:style-name="P6"><text:span text:style-name="T18">int</text:span> <text:span text:style-name="T21">id</text:span>, <text:span text:style-name="T21">p</text:span>;</text:p>
      <text:p text:style-name="P6"><text:span text:style-name="T18">int</text:span> <text:span text:style-name="T21">rounds</text:span>, <text:span text:style-name="T21">size</text:span>;</text:p>
      <text:p text:style-name="P6"><text:span text:style-name="T18">double</text:span> <text:span text:style-name="T21">start</text:span>, <text:span text:style-name="T21">end</text:span>, <text:span text:style-name="T21">time</text:span>;</text:p>
      <text:p text:style-name="P8"/>
      <text:p text:style-name="P6"><text:span text:style-name="T20">MPI_Init</text:span>(<text:span text:style-name="T22">&amp;</text:span><text:span text:style-name="T21">argc</text:span>, <text:span text:style-name="T22">&amp;</text:span><text:span text:style-name="T21">argv</text:span>);</text:p>
      <text:p text:style-name="P8"/>
      <text:p text:style-name="P6"><text:span text:style-name="T20">MPI_Comm_rank</text:span>(MPI_COMM_WORLD, <text:span text:style-name="T22">&amp;</text:span><text:span text:style-name="T21">id</text:span>);</text:p>
      <text:p text:style-name="P6"><text:span text:style-name="T20">MPI_Comm_size</text:span>(MPI_COMM_WORLD, <text:span text:style-name="T22">&amp;</text:span><text:span text:style-name="T21">p</text:span>);</text:p>
      <text:p text:style-name="P8"/>
      <text:p text:style-name="P6"><text:span text:style-name="T17">if</text:span> (<text:span text:style-name="T21">argc</text:span> <text:span text:style-name="T22">!=</text:span> <text:span text:style-name="T23">3</text:span>)</text:p>
      <text:p text:style-name="P6">{</text:p>
      <text:p text:style-name="P6"><text:span text:style-name="T17">if</text:span> (<text:span text:style-name="T21">id</text:span> <text:span text:style-name="T22">==</text:span> <text:span text:style-name="T23">0</text:span>)</text:p>
      <text:p text:style-name="P6"><text:span text:style-name="T20">printf</text:span>(<text:span text:style-name="T19">"Usage: </text:span><text:span text:style-name="T21">%s</text:span><text:span text:style-name="T19"> &lt;rounds&gt; &lt;message_size_bytes&gt;</text:span><text:span text:style-name="T24">\n</text:span><text:span text:style-name="T19">"</text:span>, <text:span text:style-name="T21">argv</text:span>[<text:span text:style-name="T23">0</text:span>]);</text:p>
      <text:p text:style-name="P6"><text:span text:style-name="T20">MPI_Finalize</text:span>();</text:p>
      <text:p text:style-name="P6"><text:span text:style-name="T17">return</text:span> <text:span text:style-name="T23">1</text:span>;</text:p>
      <text:p text:style-name="P6">}</text:p>
      <text:p text:style-name="P8"/>
      <text:p text:style-name="P6"><text:span text:style-name="T21">rounds</text:span> <text:span text:style-name="T22">=</text:span> <text:span text:style-name="T20">atoi</text:span>(<text:span text:style-name="T21">argv</text:span>[<text:span text:style-name="T23">1</text:span>]);</text:p>
      <text:p text:style-name="P6"><text:span text:style-name="T21">size</text:span> <text:span text:style-name="T22">=</text:span> <text:span text:style-name="T20">atoi</text:span>(<text:span text:style-name="T21">argv</text:span>[<text:span text:style-name="T23">2</text:span>]);</text:p>
      <text:p text:style-name="P8"/>
      <text:p text:style-name="P6"><text:span text:style-name="T18">char</text:span> <text:span text:style-name="T22">*</text:span><text:span text:style-name="T21">buffer</text:span> <text:span text:style-name="T22">=</text:span> (<text:span text:style-name="T18">char</text:span> <text:span text:style-name="T22">*</text:span>)<text:span text:style-name="T20">malloc</text:span>(<text:span text:style-name="T21">size</text:span>);</text:p>
      <text:p text:style-name="P8"/>
      <text:p text:style-name="P6"><text:span text:style-name="T17">if</text:span> (<text:span text:style-name="T21">buffer</text:span> <text:span text:style-name="T22">==</text:span> <text:span text:style-name="T18">NULL</text:span>)</text:p>
      <text:p text:style-name="P6">{</text:p>
      <text:p text:style-name="P6"><text:span text:style-name="T20">printf</text:span>(<text:span text:style-name="T19">"Memory allocation error</text:span><text:span text:style-name="T24">\n</text:span><text:span text:style-name="T19">"</text:span>);</text:p>
      <text:p text:style-name="P6"><text:span text:style-name="T20">MPI_Finalize</text:span>();</text:p>
      <text:p text:style-name="P6"><text:span text:style-name="T17">return</text:span> <text:span text:style-name="T23">1</text:span>;</text:p>
      <text:p text:style-name="P6">}</text:p>
      <text:p text:style-name="P8"/>
      <text:p text:style-name="P6"><text:span text:style-name="T20">MPI_Barrier</text:span>(MPI_COMM_WORLD);</text:p>
      <text:p text:style-name="P8"/>
      <text:p text:style-name="P6"><text:span text:style-name="T21">start</text:span> <text:span text:style-name="T22">=</text:span> <text:span text:style-name="T20">MPI_Wtime</text:span>();</text:p>
      <text:p text:style-name="P8"/>
      <text:p text:style-name="P6"><text:span text:style-name="T17">for</text:span> (<text:span text:style-name="T18">int</text:span> <text:span text:style-name="T21">i</text:span> <text:span text:style-name="T22">=</text:span> <text:span text:style-name="T23">0</text:span>; <text:span text:style-name="T21">i</text:span> <text:span text:style-name="T22">&lt;</text:span> <text:span text:style-name="T21">rounds</text:span>; <text:span text:style-name="T21">i</text:span><text:span text:style-name="T22">++</text:span>)</text:p>
      <text:p text:style-name="P6">{</text:p>
      <text:p text:style-name="P6"><text:soft-page-break/><text:span text:style-name="T17">if</text:span> (<text:span text:style-name="T21">id</text:span> <text:span text:style-name="T22">==</text:span> <text:span text:style-name="T23">0</text:span>)</text:p>
      <text:p text:style-name="P6">{</text:p>
      <text:p text:style-name="P6"><text:span text:style-name="T20">MPI_Send</text:span>(<text:span text:style-name="T21">buffer</text:span>, <text:span text:style-name="T21">size</text:span>, MPI_CHAR, <text:span text:style-name="T23">1</text:span>, <text:span text:style-name="T21">i</text:span>, MPI_COMM_WORLD);</text:p>
      <text:p text:style-name="P6"><text:span text:style-name="T20">MPI_Recv</text:span>(<text:span text:style-name="T21">buffer</text:span>, <text:span text:style-name="T21">size</text:span>, MPI_CHAR, <text:span text:style-name="T21">p</text:span> <text:span text:style-name="T22">-</text:span> <text:span text:style-name="T23">1</text:span>, <text:span text:style-name="T21">i</text:span>, MPI_COMM_WORLD, MPI_STATUS_IGNORE);</text:p>
      <text:p text:style-name="P6">}</text:p>
      <text:p text:style-name="P7">else</text:p>
      <text:p text:style-name="P6">{</text:p>
      <text:p text:style-name="P6"><text:span text:style-name="T20">MPI_Recv</text:span>(<text:span text:style-name="T21">buffer</text:span>, <text:span text:style-name="T21">size</text:span>, MPI_CHAR, <text:span text:style-name="T21">id</text:span> <text:span text:style-name="T22">-</text:span> <text:span text:style-name="T23">1</text:span>, <text:span text:style-name="T21">i</text:span>, MPI_COMM_WORLD, MPI_STATUS_IGNORE);</text:p>
      <text:p text:style-name="P6"><text:span text:style-name="T20">MPI_Send</text:span>(<text:span text:style-name="T21">buffer</text:span>, <text:span text:style-name="T21">size</text:span>, MPI_CHAR, (<text:span text:style-name="T21">id</text:span> <text:span text:style-name="T22">+</text:span> <text:span text:style-name="T23">1</text:span>) <text:span text:style-name="T22">%</text:span> <text:span text:style-name="T21">p</text:span>, <text:span text:style-name="T21">i</text:span>, MPI_COMM_WORLD);</text:p>
      <text:p text:style-name="P6">}</text:p>
      <text:p text:style-name="P6">}</text:p>
      <text:p text:style-name="P8"/>
      <text:p text:style-name="P6"><text:span text:style-name="T21">end</text:span> <text:span text:style-name="T22">=</text:span> <text:span text:style-name="T20">MPI_Wtime</text:span>();</text:p>
      <text:p text:style-name="P8"/>
      <text:p text:style-name="P6"><text:span text:style-name="T21">time</text:span> <text:span text:style-name="T22">=</text:span> <text:span text:style-name="T21">end</text:span> <text:span text:style-name="T22">-</text:span> <text:span text:style-name="T21">start</text:span>;</text:p>
      <text:p text:style-name="P8"/>
      <text:p text:style-name="P6"><text:span text:style-name="T17">if</text:span> (<text:span text:style-name="T21">id</text:span> <text:span text:style-name="T22">==</text:span> <text:span text:style-name="T23">0</text:span>)</text:p>
      <text:p text:style-name="P6">{</text:p>
      <text:p text:style-name="P6"><text:span text:style-name="T18">double</text:span> <text:span text:style-name="T21">latency</text:span> <text:span text:style-name="T22">=</text:span> (<text:span text:style-name="T21">time</text:span> <text:span text:style-name="T22">*</text:span> <text:span text:style-name="T23">1e6</text:span>) <text:span text:style-name="T22">/</text:span> (<text:span text:style-name="T23">2</text:span> <text:span text:style-name="T22">*</text:span> <text:span text:style-name="T21">rounds</text:span> <text:span text:style-name="T22">*</text:span> <text:span text:style-name="T21">p</text:span>);<text:span text:style-name="T25"> // µs por Send/Recv</text:span></text:p>
      <text:p text:style-name="P6"><text:span text:style-name="T18">double</text:span> <text:span text:style-name="T21">bandwidth</text:span> <text:span text:style-name="T22">=</text:span> ((<text:span text:style-name="T18">double</text:span>)<text:span text:style-name="T21">size</text:span> <text:span text:style-name="T22">*</text:span> <text:span text:style-name="T21">rounds</text:span> <text:span text:style-name="T22">*</text:span> <text:span text:style-name="T21">p</text:span>) <text:span text:style-name="T22">/</text:span> <text:span text:style-name="T21">time</text:span>;<text:span text:style-name="T25"> // bytes/s</text:span></text:p>
      <text:p text:style-name="P8"/>
      <text:p text:style-name="P6"><text:span text:style-name="T20">printf</text:span>(<text:span text:style-name="T19">"Rounds = </text:span><text:span text:style-name="T21">%d</text:span><text:span text:style-name="T19">, Processes = </text:span><text:span text:style-name="T21">%d</text:span><text:span text:style-name="T24">\n</text:span><text:span text:style-name="T19">"</text:span>, <text:span text:style-name="T21">rounds</text:span>, <text:span text:style-name="T21">p</text:span>);</text:p>
      <text:p text:style-name="P6"><text:span text:style-name="T20">printf</text:span>(<text:span text:style-name="T19">"Message size = </text:span><text:span text:style-name="T21">%d</text:span><text:span text:style-name="T19"> bytes</text:span><text:span text:style-name="T24">\n</text:span><text:span text:style-name="T19">"</text:span>, <text:span text:style-name="T21">size</text:span>);</text:p>
      <text:p text:style-name="P6"><text:span text:style-name="T20">printf</text:span>(<text:span text:style-name="T19">"Total time = </text:span><text:span text:style-name="T21">%lf</text:span><text:span text:style-name="T19"> sec</text:span><text:span text:style-name="T24">\n</text:span><text:span text:style-name="T19">"</text:span>, <text:span text:style-name="T21">time</text:span>);</text:p>
      <text:p text:style-name="P6"><text:span text:style-name="T20">printf</text:span>(<text:span text:style-name="T19">"Latency per Send/Recv = </text:span><text:span text:style-name="T21">%lf</text:span><text:span text:style-name="T19"> us</text:span><text:span text:style-name="T24">\n</text:span><text:span text:style-name="T19">"</text:span>, <text:span text:style-name="T21">latency</text:span>);</text:p>
      <text:p text:style-name="P6"><text:span text:style-name="T20">printf</text:span>(<text:span text:style-name="T19">"Bandwidth = </text:span><text:span text:style-name="T21">%lf</text:span><text:span text:style-name="T19"> MB/s</text:span><text:span text:style-name="T24">\n</text:span><text:span text:style-name="T19">"</text:span>, <text:span text:style-name="T21">bandwidth</text:span> <text:span text:style-name="T22">/</text:span> (<text:span text:style-name="T23">1024</text:span> <text:span text:style-name="T22">*</text:span> <text:span text:style-name="T23">1024</text:span>));</text:p>
      <text:p text:style-name="P6">}</text:p>
      <text:p text:style-name="P8"/>
      <text:p text:style-name="P6"><text:span text:style-name="T20">free</text:span>(<text:span text:style-name="T21">buffer</text:span>);</text:p>
      <text:p text:style-name="P8"/>
      <text:p text:style-name="P6"><text:span text:style-name="T20">MPI_Finalize</text:span>();</text:p>
      <text:p text:style-name="P6"><text:span text:style-name="T17">return</text:span> <text:span text:style-name="T23">0</text:span>;</text:p>
      <text:p text:style-name="P6">}</text:p>
      <text:p text:style-name="P3"/>
      <text:p text:style-name="P3"/>
      <text:p text:style-name="P3"/>
      <text:h text:style-name="P1" text:outline-level="1">4. Referências Bibliográficas </text:h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5:14:16.976694621</meta:creation-date>
    <dc:date>2026-05-12T22:36:44.680142691</dc:date>
    <meta:editing-duration>PT3H13M51S</meta:editing-duration>
    <meta:editing-cycles>2</meta:editing-cycles>
    <meta:generator>LibreOffice/24.2.7.2$Linux_X86_64 LibreOffice_project/420$Build-2</meta:generator>
    <meta:print-date>2026-05-12T22:17:40.505000801</meta:print-date>
    <meta:printed-by>PDF files</meta:printed-by>
    <meta:document-statistic meta:table-count="0" meta:image-count="1" meta:object-count="0" meta:page-count="4" meta:paragraph-count="78" meta:word-count="584" meta:character-count="3896" meta:non-whitespace-character-count="3381"/>
  </office:meta>
</office:document-meta>
</file>